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ea8" officeooo:paragraph-rsid="00174ea8"/>
    </style:style>
    <style:style style:name="P2" style:family="paragraph" style:parent-style-name="Standard">
      <style:text-properties officeooo:rsid="0018c5f8" officeooo:paragraph-rsid="0018c5f8"/>
    </style:style>
    <style:style style:name="P3" style:family="paragraph" style:parent-style-name="Standard">
      <style:text-properties officeooo:rsid="0009d743" officeooo:paragraph-rsid="001adb54"/>
    </style:style>
    <style:style style:name="P4" style:family="paragraph" style:parent-style-name="Standard">
      <style:text-properties officeooo:rsid="0009a083" officeooo:paragraph-rsid="001adb54"/>
    </style:style>
    <style:style style:name="P5" style:family="paragraph" style:parent-style-name="Standard">
      <style:text-properties officeooo:rsid="00175600" officeooo:paragraph-rsid="001adb54"/>
    </style:style>
    <style:style style:name="P6" style:family="paragraph" style:parent-style-name="Standard">
      <style:text-properties officeooo:rsid="00174ea8" officeooo:paragraph-rsid="001adb54"/>
    </style:style>
    <style:style style:name="T1" style:family="text">
      <style:text-properties officeooo:rsid="0018c5f8"/>
    </style:style>
    <style:style style:name="T2" style:family="text">
      <style:text-properties officeooo:rsid="0009d743"/>
    </style:style>
    <style:style style:name="T3" style:family="text">
      <style:text-properties officeooo:rsid="0009a083"/>
    </style:style>
    <style:style style:name="T4" style:family="text">
      <style:text-properties officeooo:rsid="00175600"/>
    </style:style>
    <style:style style:name="T5" style:family="text">
      <style:text-properties officeooo:rsid="001873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ro desenvolver um sistema para ajudar a me organizar e a planejar as minhas aulas.</text:p>
      <text:p text:style-name="P5"/>
      <text:p text:style-name="P5">Dou aulas de Física e Educação financeira e me chamo Cristiano</text:p>
      <text:p text:style-name="P5"/>
      <text:p text:style-name="P5">Essas são as minhas turmas de educação financeira:</text:p>
      <text:p text:style-name="P5"/>
      <text:p text:style-name="P5">7 ano C</text:p>
      <text:p text:style-name="P5">7 ano B</text:p>
      <text:p text:style-name="P5">8 ano B</text:p>
      <text:p text:style-name="P5">8 ano A</text:p>
      <text:p text:style-name="P5">1 série A</text:p>
      <text:p text:style-name="P5">1 série B</text:p>
      <text:p text:style-name="P5"/>
      <text:p text:style-name="P5">Essas são as minhas turmas de Física</text:p>
      <text:p text:style-name="P5"/>
      <text:p text:style-name="P5">2 série B</text:p>
      <text:p text:style-name="P5">2 série C</text:p>
      <text:p text:style-name="P5">3 série B</text:p>
      <text:p text:style-name="P5"/>
      <text:p text:style-name="P5">Quero que o sistema tenha um CRUD para turmas e que já venha com as funcionalidades 100% funcionais. Por exemplo, seja possível criar uma nova turma, listar as turmas existentes, atualizar as turmas e deletar as turmas é importante notar que cada turma tem o ano(um número) e a sala associada(a letra), a disciplina associada(Física ou educação financeira) <text:span text:style-name="T5">e a quantidade de alunos na sala de aula</text:span>.</text:p>
      <text:p text:style-name="P5"/>
      <text:p text:style-name="P5">O sistema deve ser responsivo para celular e eficiente.</text:p>
      <text:p text:style-name="P5"/>
      <text:p text:style-name="P5">Quero que o sistema para computador tenha uma nabvar lateral para navegar entre as telas com ícones e hover que aparece o nome do que aquilo representa.</text:p>
      <text:p text:style-name="P5"/>
      <text:p text:style-name="P5">Cada ano/série possui conteúdo específico que não diferencia de uma sala para outra, ou seja o slide do sétimo A é o mesmo slide do sétimo B</text:p>
      <text:p text:style-name="P5"/>
      <text:p text:style-name="P5">Crie a funcionalidade 100% desenvolvidas para o conteúdo da aula que seja possível marcar em qual slide a turma está e que eu possa marcar caso tenha terminado um slide. Cada turma possui 14 slides, mas quero que eu possa alterar caso a quantidade de slide mude</text:p>
      <text:p text:style-name="P5"/>
      <text:p text:style-name="P5">A primeira tela/icone da navbar é a tela principal do sistema. Ela deve mostrar as turmas que dou aula no dia e em qual slide eu parei.</text:p>
      <text:p text:style-name="P5"/>
      <text:p text:style-name="P5">O segundo icone, deve mudar a tela e ser referente ao horário das minhas aulas. Quero ter um calendário local com um CRUD integrado para eu adicionar o dia, horário, a turma, e o slide que vai ser passado naquele dia.</text:p>
      <text:p text:style-name="P5"/>
      <text:p text:style-name="P6"><text:span text:style-name="T4">O site deve ser integrado com vercel e supabase e deve ser passada as instruções do passo a passo para fazer o site funcionar.</text:span>Quero que sejam realizadas as seguintes mudanças. </text:p>
      <text:p text:style-name="P1"/>
      <text:p text:style-name="P1">1 – Em todas as turmar quero que o card da turma seja 30% menor, mas sem retirar nenhuma das informações</text:p>
      <text:p text:style-name="P1"/>
      <text:p text:style-name="P1">2 – Ao adicionar turma quero que tenha as seguintes opções além de Física e educação financeira: Tecnologia e Matemática</text:p>
      <text:p text:style-name="P1"><text:soft-page-break/></text:p>
      <text:p text:style-name="P1">3 – Quero que o card da aula do dia no mural também abra a página de alterações menor e que seja 30% menor, assim como na página de todas as turmas</text:p>
      <text:p text:style-name="P1"/>
      <text:p text:style-name="P1">4 – No mural quero que no mural os links uteis e os lembretes fiquem lado a lado se houver espaço em telas de computadores e só desça para baixo caso seja necessário, mas quero que no celular continue um abaixo do outro</text:p>
      <text:p text:style-name="P1"/>
      <text:p text:style-name="P1">5 – Na aba de calendários o hover da figura feliz faz com que a figura suma, não quero que isso aconteça</text:p>
      <text:p text:style-name="P1"/>
      <text:p text:style-name="P1">6 – No celular o calendário quebra, quero que apareça apenas uma bolinha azul para cada aula que não quebre a visualização ou alguma outra alternativa que não quebre o site</text:p>
      <text:p text:style-name="P1"/>
      <text:p text:style-name="P1">7 – <text:span text:style-name="T1">quero que a navbar lateral seja desconectado do canto em computador e tenha as quatro bordas arredondadas, mas quero que no celular continue exatamente igual, quero que a barra lateral seja centralizada verticalmente e fique próxima a lateral esquerda em computador</text:span></text:p>
      <text:p text:style-name="P1"/>
      <text:p text:style-name="P2">8 – Alguns cards ocupam mais espaço do que tem disponível em celular, corrija isso.</text:p>
      <text:p text:style-name="P2"/>
      <text:p text:style-name="P4">Vou listar atualizações que quero que sejam feitas.</text:p>
      <text:p text:style-name="P4"/>
      <text:p text:style-name="P4">1 – Onde está EE substitua por um icone que remeta a uma escola, mas que seja colorido com uma tonalidade diferente dos icones da navbar podendo ser branco, ou alguma outra cor que dê um bom contraste visual com a cor do fundo.</text:p>
      <text:p text:style-name="P4"/>
      <text:p text:style-name="P4">2 – O hover em que aparece turmas do dia, quero que apareça mural ao invés de turmas do dia. </text:p>
      <text:p text:style-name="P4"/>
      <text:p text:style-name="P4">3 – Em horário/ calendário quero que nos sábados <text:s/>e domingos tenha uma animação simples e minimalista porém com bastante cores de uma pessoa feliz em um dia ensolarado e muito bonito com cores verdes e azuis vibrantes nesse item pode ser criativo</text:p>
      <text:p text:style-name="P4"/>
      <text:p text:style-name="P4">4 – Na aula que aparece no calendário apenas o horário de Início da aula e a turma, quero que mostre o horário de término da aula também</text:p>
      <text:p text:style-name="P4"/>
      <text:p text:style-name="P4">5 – ao adicionar ou editar um evento o relógio preto não contrasta bem com o fundo, quero que ele tenha uma tonalidade branca ou mais clara seguindo o padrão de cores que já existe</text:p>
      <text:p text:style-name="P4"/>
      <text:p text:style-name="P4">6 – Na aba de todas as turmas onde gerencia as turmas, quero que seja possível clicar e que a aba de todas as turmas tenha uma animação em que eu possa fazer anotações sobre a sala e que isso seja persistido no banco de dados quando eu pressionar um botão de salvar. Não quero que seja um modal quero que tudo em gerenciar turmas suma, fique apenas o nome da sala, número de alunos, o slide em que estou e qual a matéria que a turma pertence. Nessa aba também deve ser possível marcar um slide como concluído e isso também deve ser persistido no banco de dados</text:p>
      <text:p text:style-name="P4"/>
      <text:p text:style-name="P4">7 – No mural quero que seja adicionado um espaço(apenas para computador) em que eu possa adicionar um link, um nome <text:s/>e um ícone que vai aparecer no modal <text:span text:style-name="T2">quando for adicionar, para que no mural tenha links que eu possa adicionar remover listar e atualizar, isso também deve ser persistido no banco de dados</text:span></text:p>
      <text:p text:style-name="P4"/>
      <text:p text:style-name="P3"><text:soft-page-break/>8 – Quero que no Mural, <text:span text:style-name="T3">(apenas para computador) , </text:span>eu possa adicionar um lembrete rápido e marcar como concluido, deve ser possível adicionar o lembrete e marcar como concluido, quando for marcado como concluido ele tem uma animação e é excluido/deletado.</text:p>
      <text:p text:style-name="P3"/>
      <text:p text:style-name="P3">Garanta que o site seguirá responsivo e faça um passo a passo caso eu precise fazer algo para implementar as mudanças e faça tudo em português para que eu consiga entend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5:53:16.759803128</meta:creation-date>
    <dc:date>2026-02-13T09:07:08.648879020</dc:date>
    <meta:editing-duration>PT8M5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39" meta:word-count="969" meta:character-count="5283" meta:non-whitespace-character-count="4333"/>
  </office:meta>
</office:document-meta>
</file>